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Sans" svg:font-family="'Ubuntu Sans'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1.7402in"/>
    </style:style>
    <style:style style:name="co3" style:family="table-column">
      <style:table-column-properties fo:break-before="auto" style:column-width="1.5689in"/>
    </style:style>
    <style:style style:name="co4" style:family="table-column">
      <style:table-column-properties fo:break-before="auto" style:column-width="1.6972in"/>
    </style:style>
    <style:style style:name="co5" style:family="table-column">
      <style:table-column-properties fo:break-before="auto" style:column-width="1.5043in"/>
    </style:style>
    <style:style style:name="co6" style:family="table-column">
      <style:table-column-properties fo:break-before="auto" style:column-width="1.3327in"/>
    </style:style>
    <style:style style:name="co7" style:family="table-column">
      <style:table-column-properties fo:break-before="auto" style:column-width="1.4618in"/>
    </style:style>
    <style:style style:name="co8" style:family="table-column">
      <style:table-column-properties fo:break-before="auto" style:column-width="1.622in"/>
    </style:style>
    <style:style style:name="co9" style:family="table-column">
      <style:table-column-properties fo:break-before="auto" style:column-width="1.4508in"/>
    </style:style>
    <style:style style:name="co10" style:family="table-column">
      <style:table-column-properties fo:break-before="auto" style:column-width="1.5799in"/>
    </style:style>
    <style:style style:name="co11" style:family="table-column">
      <style:table-column-properties fo:break-before="auto" style:column-width="1.7728in"/>
    </style:style>
    <style:style style:name="co12" style:family="table-column">
      <style:table-column-properties fo:break-before="auto" style:column-width="1.6008in"/>
    </style:style>
    <style:style style:name="co13" style:family="table-column">
      <style:table-column-properties fo:break-before="auto" style:column-width="1.7299in"/>
    </style:style>
    <style:style style:name="co14" style:family="table-column">
      <style:table-column-properties fo:break-before="auto" style:column-width="1.4291in"/>
    </style:style>
    <style:style style:name="co15" style:family="table-column">
      <style:table-column-properties fo:break-before="auto" style:column-width="1.5583in"/>
    </style:style>
    <style:style style:name="co16" style:family="table-column">
      <style:table-column-properties fo:break-before="auto" style:column-width="1.5472in"/>
    </style:style>
    <style:style style:name="co17" style:family="table-column">
      <style:table-column-properties fo:break-before="auto" style:column-width="1.3756in"/>
    </style:style>
    <style:style style:name="co18" style:family="table-column">
      <style:table-column-properties fo:break-before="auto" style:column-width="0.1638in"/>
    </style:style>
    <style:style style:name="co1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o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insertionsort_MelhorCaso</text:p>
          </table:table-cell>
          <table:table-cell office:value-type="string" calcext:value-type="string">
            <text:p><text:s/>insertionsort_PiorCaso</text:p>
          </table:table-cell>
          <table:table-cell office:value-type="string" calcext:value-type="string">
            <text:p><text:s/>insertionsort_CasoMedio</text:p>
          </table:table-cell>
          <table:table-cell office:value-type="string" calcext:value-type="string">
            <text:p><text:s/>shellsort_MelhorCaso</text:p>
          </table:table-cell>
          <table:table-cell office:value-type="string" calcext:value-type="string">
            <text:p><text:s/>shellsort_PiorCaso</text:p>
          </table:table-cell>
          <table:table-cell office:value-type="string" calcext:value-type="string">
            <text:p><text:s/>shellsort_CasoMedio</text:p>
          </table:table-cell>
          <table:table-cell office:value-type="string" calcext:value-type="string">
            <text:p><text:s/>bubblesort_MelhorCaso</text:p>
          </table:table-cell>
          <table:table-cell office:value-type="string" calcext:value-type="string">
            <text:p><text:s/>bubblesort_PiorCaso</text:p>
          </table:table-cell>
          <table:table-cell office:value-type="string" calcext:value-type="string">
            <text:p><text:s/>bubblesort_CasoMedio</text:p>
          </table:table-cell>
          <table:table-cell office:value-type="string" calcext:value-type="string">
            <text:p><text:s/>selectionsort_MelhorCaso</text:p>
          </table:table-cell>
          <table:table-cell office:value-type="string" calcext:value-type="string">
            <text:p><text:s/>selectionsort_PiorCaso</text:p>
          </table:table-cell>
          <table:table-cell office:value-type="string" calcext:value-type="string">
            <text:p><text:s/>selectionsort_CasoMedio</text:p>
          </table:table-cell>
          <table:table-cell office:value-type="string" calcext:value-type="string">
            <text:p><text:s/>mergesort_MelhorCaso</text:p>
          </table:table-cell>
          <table:table-cell office:value-type="string" calcext:value-type="string">
            <text:p><text:s/>mergesort_PiorCaso</text:p>
          </table:table-cell>
          <table:table-cell office:value-type="string" calcext:value-type="string">
            <text:p><text:s/>mergesort_CasoMedio</text:p>
          </table:table-cell>
          <table:table-cell office:value-type="string" calcext:value-type="string">
            <text:p><text:s/>quicksort_MelhorCaso</text:p>
          </table:table-cell>
          <table:table-cell office:value-type="string" calcext:value-type="string">
            <text:p><text:s/>quicksort_PiorCaso</text:p>
          </table:table-cell>
          <table:table-cell office:value-type="string" calcext:value-type="string">
            <text:p><text:s/>quicksort_CasoMedi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0000335561" calcext:value-type="float">
            <text:p>0.00000000335561</text:p>
          </table:table-cell>
          <table:table-cell office:value-type="float" office:value="0.00000000278251" calcext:value-type="float">
            <text:p>0.00000000278251</text:p>
          </table:table-cell>
          <table:table-cell office:value-type="float" office:value="0.000000294586" calcext:value-type="float">
            <text:p>0.000000294586</text:p>
          </table:table-cell>
          <table:table-cell office:value-type="float" office:value="0.00000000810643" calcext:value-type="float">
            <text:p>0.00000000810643</text:p>
          </table:table-cell>
          <table:table-cell office:value-type="float" office:value="0.00000000491682" calcext:value-type="float">
            <text:p>0.00000000491682</text:p>
          </table:table-cell>
          <table:table-cell office:value-type="float" office:value="0.000000652072" calcext:value-type="float">
            <text:p>0.000000652072</text:p>
          </table:table-cell>
          <table:table-cell office:value-type="float" office:value="0.00000000255722" calcext:value-type="float">
            <text:p>0.00000000255722</text:p>
          </table:table-cell>
          <table:table-cell office:value-type="float" office:value="0.00000000372714" calcext:value-type="float">
            <text:p>0.00000000372714</text:p>
          </table:table-cell>
          <table:table-cell office:value-type="float" office:value="0.000000603077" calcext:value-type="float">
            <text:p>0.000000603077</text:p>
          </table:table-cell>
          <table:table-cell office:value-type="float" office:value="0.00000000284575" calcext:value-type="float">
            <text:p>0.00000000284575</text:p>
          </table:table-cell>
          <table:table-cell office:value-type="float" office:value="0.0000000030078" calcext:value-type="float">
            <text:p>0.0000000030078</text:p>
          </table:table-cell>
          <table:table-cell office:value-type="float" office:value="0.000000395792" calcext:value-type="float">
            <text:p>0.000000395792</text:p>
          </table:table-cell>
          <table:table-cell office:value-type="float" office:value="0.0000000084661" calcext:value-type="float">
            <text:p>0.0000000084661</text:p>
          </table:table-cell>
          <table:table-cell office:value-type="float" office:value="0.00000000417772" calcext:value-type="float">
            <text:p>0.00000000417772</text:p>
          </table:table-cell>
          <table:table-cell office:value-type="float" office:value="0.000000714081" calcext:value-type="float">
            <text:p>0.000000714081</text:p>
          </table:table-cell>
          <table:table-cell office:value-type="float" office:value="0.00000000372714" calcext:value-type="float">
            <text:p>0.00000000372714</text:p>
          </table:table-cell>
          <table:table-cell office:value-type="float" office:value="0.00000000293665" calcext:value-type="float">
            <text:p>0.00000000293665</text:p>
          </table:table-cell>
          <table:table-cell office:value-type="float" office:value="0.000000416764" calcext:value-type="float">
            <text:p>0.00000041676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00292632" calcext:value-type="float">
            <text:p>0.000000292632</text:p>
          </table:table-cell>
          <table:table-cell office:value-type="float" office:value="0.0000000754727" calcext:value-type="float">
            <text:p>0.0000000754727</text:p>
          </table:table-cell>
          <table:table-cell office:value-type="float" office:value="0.00000354585" calcext:value-type="float">
            <text:p>0.00000354585</text:p>
          </table:table-cell>
          <table:table-cell office:value-type="float" office:value="0.000000608404" calcext:value-type="float">
            <text:p>0.000000608404</text:p>
          </table:table-cell>
          <table:table-cell office:value-type="float" office:value="0.000000451408" calcext:value-type="float">
            <text:p>0.000000451408</text:p>
          </table:table-cell>
          <table:table-cell office:value-type="float" office:value="0.0000204257" calcext:value-type="float">
            <text:p>0.0000204257</text:p>
          </table:table-cell>
          <table:table-cell office:value-type="float" office:value="0.0000010445" calcext:value-type="float">
            <text:p>0.0000010445</text:p>
          </table:table-cell>
          <table:table-cell office:value-type="float" office:value="0.000000727306" calcext:value-type="float">
            <text:p>0.000000727306</text:p>
          </table:table-cell>
          <table:table-cell office:value-type="float" office:value="0.0000403085" calcext:value-type="float">
            <text:p>0.0000403085</text:p>
          </table:table-cell>
          <table:table-cell office:value-type="float" office:value="0.000000445355" calcext:value-type="float">
            <text:p>0.000000445355</text:p>
          </table:table-cell>
          <table:table-cell office:value-type="float" office:value="0.000000406195" calcext:value-type="float">
            <text:p>0.000000406195</text:p>
          </table:table-cell>
          <table:table-cell office:value-type="float" office:value="0.0000192404" calcext:value-type="float">
            <text:p>0.0000192404</text:p>
          </table:table-cell>
          <table:table-cell office:value-type="float" office:value="0.000000352798" calcext:value-type="float">
            <text:p>0.000000352798</text:p>
          </table:table-cell>
          <table:table-cell office:value-type="float" office:value="0.000000256676" calcext:value-type="float">
            <text:p>0.000000256676</text:p>
          </table:table-cell>
          <table:table-cell office:value-type="float" office:value="0.0000103242" calcext:value-type="float">
            <text:p>0.0000103242</text:p>
          </table:table-cell>
          <table:table-cell office:value-type="float" office:value="0.000000211464" calcext:value-type="float">
            <text:p>0.000000211464</text:p>
          </table:table-cell>
          <table:table-cell office:value-type="float" office:value="0.00000016376" calcext:value-type="float">
            <text:p>0.00000016376</text:p>
          </table:table-cell>
          <table:table-cell office:value-type="float" office:value="0.00000514219" calcext:value-type="float">
            <text:p>0.0000051421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13302" calcext:value-type="float">
            <text:p>0.00013302</text:p>
          </table:table-cell>
          <table:table-cell office:value-type="float" office:value="0.00000265743" calcext:value-type="float">
            <text:p>0.00000265743</text:p>
          </table:table-cell>
          <table:table-cell office:value-type="float" office:value="0.0000177742" calcext:value-type="float">
            <text:p>0.0000177742</text:p>
          </table:table-cell>
          <table:table-cell office:value-type="float" office:value="0.000206416" calcext:value-type="float">
            <text:p>0.000206416</text:p>
          </table:table-cell>
          <table:table-cell office:value-type="float" office:value="0.000206116" calcext:value-type="float">
            <text:p>0.000206116</text:p>
          </table:table-cell>
          <table:table-cell office:value-type="float" office:value="0.00127487" calcext:value-type="float">
            <text:p>0.00127487</text:p>
          </table:table-cell>
          <table:table-cell office:value-type="float" office:value="0.000582204" calcext:value-type="float">
            <text:p>0.000582204</text:p>
          </table:table-cell>
          <table:table-cell office:value-type="float" office:value="0.00040923" calcext:value-type="float">
            <text:p>0.00040923</text:p>
          </table:table-cell>
          <table:table-cell office:value-type="float" office:value="0.00241293" calcext:value-type="float">
            <text:p>0.00241293</text:p>
          </table:table-cell>
          <table:table-cell office:value-type="float" office:value="0.000191007" calcext:value-type="float">
            <text:p>0.000191007</text:p>
          </table:table-cell>
          <table:table-cell office:value-type="float" office:value="0.000184381" calcext:value-type="float">
            <text:p>0.000184381</text:p>
          </table:table-cell>
          <table:table-cell office:value-type="float" office:value="0.00112227" calcext:value-type="float">
            <text:p>0.00112227</text:p>
          </table:table-cell>
          <table:table-cell office:value-type="float" office:value="0.0000184118" calcext:value-type="float">
            <text:p>0.0000184118</text:p>
          </table:table-cell>
          <table:table-cell office:value-type="float" office:value="0.0000135509" calcext:value-type="float">
            <text:p>0.0000135509</text:p>
          </table:table-cell>
          <table:table-cell office:value-type="float" office:value="0.0000745676" calcext:value-type="float">
            <text:p>0.0000745676</text:p>
          </table:table-cell>
          <table:table-cell office:value-type="float" office:value="0.0000136596" calcext:value-type="float">
            <text:p>0.0000136596</text:p>
          </table:table-cell>
          <table:table-cell office:value-type="float" office:value="0.00000759631" calcext:value-type="float">
            <text:p>0.00000759631</text:p>
          </table:table-cell>
          <table:table-cell office:value-type="float" office:value="0.0000430491" calcext:value-type="float">
            <text:p>0.000043049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367423" calcext:value-type="float">
            <text:p>0.0367423</text:p>
          </table:table-cell>
          <table:table-cell office:value-type="float" office:value="0.0000889619" calcext:value-type="float">
            <text:p>0.0000889619</text:p>
          </table:table-cell>
          <table:table-cell office:value-type="float" office:value="0.0000928638" calcext:value-type="float">
            <text:p>0.0000928638</text:p>
          </table:table-cell>
          <table:table-cell office:value-type="float" office:value="0.0569572" calcext:value-type="float">
            <text:p>0.0569572</text:p>
          </table:table-cell>
          <table:table-cell office:value-type="float" office:value="0.052353" calcext:value-type="float">
            <text:p>0.052353</text:p>
          </table:table-cell>
          <table:table-cell office:value-type="float" office:value="0.051308" calcext:value-type="float">
            <text:p>0.051308</text:p>
          </table:table-cell>
          <table:table-cell office:value-type="float" office:value="0.179106" calcext:value-type="float">
            <text:p>0.179106</text:p>
          </table:table-cell>
          <table:table-cell office:value-type="float" office:value="0.0983434" calcext:value-type="float">
            <text:p>0.0983434</text:p>
          </table:table-cell>
          <table:table-cell office:value-type="float" office:value="0.0989193" calcext:value-type="float">
            <text:p>0.0989193</text:p>
          </table:table-cell>
          <table:table-cell office:value-type="float" office:value="0.0500251" calcext:value-type="float">
            <text:p>0.0500251</text:p>
          </table:table-cell>
          <table:table-cell office:value-type="float" office:value="0.0487353" calcext:value-type="float">
            <text:p>0.0487353</text:p>
          </table:table-cell>
          <table:table-cell office:value-type="float" office:value="0.0548517" calcext:value-type="float">
            <text:p>0.0548517</text:p>
          </table:table-cell>
          <table:table-cell office:value-type="float" office:value="0.000707824" calcext:value-type="float">
            <text:p>0.000707824</text:p>
          </table:table-cell>
          <table:table-cell office:value-type="float" office:value="0.000550283" calcext:value-type="float">
            <text:p>0.000550283</text:p>
          </table:table-cell>
          <table:table-cell office:value-type="float" office:value="0.00057373" calcext:value-type="float">
            <text:p>0.00057373</text:p>
          </table:table-cell>
          <table:table-cell office:value-type="float" office:value="0.000514629" calcext:value-type="float">
            <text:p>0.000514629</text:p>
          </table:table-cell>
          <table:table-cell office:value-type="float" office:value="0.000261177" calcext:value-type="float">
            <text:p>0.000261177</text:p>
          </table:table-cell>
          <table:table-cell office:value-type="float" office:value="0.000255672" calcext:value-type="float">
            <text:p>0.00025567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>
            <draw:frame draw:z-index="0" draw:style-name="gr1" draw:text-style-name="P1" svg:width="6.4697in" svg:height="3.6496in" svg:x="0.5008in" svg:y="0.0681in">
              <draw:object draw:notify-on-update-of-ranges="out.A1:out.A1 out.B1:out.S1 out.A2:out.A2 out.B2:out.S2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3"/>
          <table:table-cell>
            <draw:frame draw:z-index="1" draw:style-name="gr1" draw:text-style-name="P1" svg:width="6.4697in" svg:height="3.6496in" svg:x="1.2917in" svg:y="0.1311in">
              <draw:object draw:notify-on-update-of-ranges="out.B1:out.S1 out.A3:out.A3 out.B3:out.S3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2"/>
        </table:table-row>
        <table:table-row table:style-name="ro1" table:number-rows-repeated="22">
          <table:table-cell table:number-columns-repeated="20"/>
        </table:table-row>
        <table:table-row table:style-name="ro1">
          <table:table-cell table:number-columns-repeated="3"/>
          <table:table-cell>
            <draw:frame draw:z-index="2" draw:style-name="gr1" draw:text-style-name="P1" svg:width="6.4697in" svg:height="3.6496in" svg:x="0.3453in" svg:y="0.1307in">
              <draw:object draw:notify-on-update-of-ranges="out.B1:out.S1 out.A4:out.A4 out.B4:out.S4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3"/>
          <table:table-cell>
            <draw:frame draw:z-index="3" draw:style-name="gr1" draw:text-style-name="P1" svg:width="6.4697in" svg:height="3.6496in" svg:x="1.3177in" svg:y="0.1335in">
              <draw:object draw:notify-on-update-of-ranges="out.B1:out.S1 out.A5:out.A5 out.B5:out.S5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Sans" svg:font-family="'Ubuntu Sans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6-29T00:26:22.964769987</dc:date>
    <meta:editing-duration>PT9M18S</meta:editing-duration>
    <meta:editing-cycles>1</meta:editing-cycles>
    <meta:document-statistic meta:table-count="1" meta:cell-count="100" meta:object-count="4"/>
    <meta:generator>LibreOffice/26.2.4.2$Linux_X86_64 LibreOffice_project/62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434cm" svg:height="9.271cm" xlink:href=".." xlink:type="simple" chart:class="chart:bar" chart:style-name="ch1">
        <chart:legend chart:legend-position="end" svg:x="15.105cm" svg:y="4.336cm" style:legend-expansion="high" chart:style-name="ch2"/>
        <chart:plot-area chart:style-name="ch3" svg:x="0.328cm" svg:y="0.185cm" svg:width="14.449cm" svg:height="8.901cm">
          <chart:coordinate-region svg:x="4.651cm" svg:y="0.185cm" svg:width="9.504cm" svg:height="8.254cm"/>
          <chart:axis chart:dimension="x" chart:name="primary-x" chart:style-name="ch4" chartooo:axis-type="auto">
            <chartooo:date-scale/>
            <chart:categories table:cell-range-address="out.B1:out.S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ut.B3:out.S3" chart:label-cell-address="out.A3:out.A3" chart:class="chart:bar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insertionsort_MelhorCaso</text:p>
                <draw:g>
                  <svg:desc>out.B1:out.S1</svg:desc>
                </draw:g>
              </table:table-cell>
              <table:table-cell office:value-type="string">
                <text:p> insertionsort_PiorCaso</text:p>
              </table:table-cell>
              <table:table-cell office:value-type="string">
                <text:p> insertionsort_CasoMedio</text:p>
              </table:table-cell>
              <table:table-cell office:value-type="string">
                <text:p> shellsort_MelhorCaso</text:p>
              </table:table-cell>
              <table:table-cell office:value-type="string">
                <text:p> shellsort_PiorCaso</text:p>
              </table:table-cell>
              <table:table-cell office:value-type="string">
                <text:p> shellsort_CasoMedio</text:p>
              </table:table-cell>
              <table:table-cell office:value-type="string">
                <text:p> bubblesort_MelhorCaso</text:p>
              </table:table-cell>
              <table:table-cell office:value-type="string">
                <text:p> bubblesort_PiorCaso</text:p>
              </table:table-cell>
              <table:table-cell office:value-type="string">
                <text:p> bubblesort_CasoMedio</text:p>
              </table:table-cell>
              <table:table-cell office:value-type="string">
                <text:p> selectionsort_MelhorCaso</text:p>
              </table:table-cell>
              <table:table-cell office:value-type="string">
                <text:p> selectionsort_PiorCaso</text:p>
              </table:table-cell>
              <table:table-cell office:value-type="string">
                <text:p> selectionsort_CasoMedio</text:p>
              </table:table-cell>
              <table:table-cell office:value-type="string">
                <text:p> mergesort_MelhorCaso</text:p>
              </table:table-cell>
              <table:table-cell office:value-type="string">
                <text:p> mergesort_PiorCaso</text:p>
              </table:table-cell>
              <table:table-cell office:value-type="string">
                <text:p> mergesort_CasoMedio</text:p>
              </table:table-cell>
              <table:table-cell office:value-type="string">
                <text:p> quicksort_MelhorCaso</text:p>
              </table:table-cell>
              <table:table-cell office:value-type="string">
                <text:p> quicksort_PiorCaso</text:p>
              </table:table-cell>
              <table:table-cell office:value-type="string">
                <text:p> quicksort_CasoMedio</text:p>
              </table:table-cell>
            </table:table-row>
          </table:table-header-rows>
          <table:table-rows>
            <table:table-row>
              <table:table-cell office:value-type="string">
                <text:p>100</text:p>
                <draw:g>
                  <svg:desc>out.A3:out.A3</svg:desc>
                </draw:g>
              </table:table-cell>
              <table:table-cell office:value-type="float" office:value="0.000000292632">
                <text:p>0.000000292632</text:p>
                <draw:g>
                  <svg:desc>out.B3:out.S3</svg:desc>
                </draw:g>
              </table:table-cell>
              <table:table-cell office:value-type="float" office:value="0.0000000754727">
                <text:p>0.0000000754727</text:p>
              </table:table-cell>
              <table:table-cell office:value-type="float" office:value="0.00000354585">
                <text:p>0.00000354585</text:p>
              </table:table-cell>
              <table:table-cell office:value-type="float" office:value="0.000000608404">
                <text:p>0.000000608404</text:p>
              </table:table-cell>
              <table:table-cell office:value-type="float" office:value="0.000000451408">
                <text:p>0.000000451408</text:p>
              </table:table-cell>
              <table:table-cell office:value-type="float" office:value="0.0000204257">
                <text:p>0.0000204257</text:p>
              </table:table-cell>
              <table:table-cell office:value-type="float" office:value="0.0000010445">
                <text:p>0.0000010445</text:p>
              </table:table-cell>
              <table:table-cell office:value-type="float" office:value="0.000000727306">
                <text:p>0.000000727306</text:p>
              </table:table-cell>
              <table:table-cell office:value-type="float" office:value="0.0000403085">
                <text:p>0.0000403085</text:p>
              </table:table-cell>
              <table:table-cell office:value-type="float" office:value="0.000000445355">
                <text:p>0.000000445355</text:p>
              </table:table-cell>
              <table:table-cell office:value-type="float" office:value="0.000000406195">
                <text:p>0.000000406195</text:p>
              </table:table-cell>
              <table:table-cell office:value-type="float" office:value="0.0000192404">
                <text:p>0.0000192404</text:p>
              </table:table-cell>
              <table:table-cell office:value-type="float" office:value="0.000000352798">
                <text:p>0.000000352798</text:p>
              </table:table-cell>
              <table:table-cell office:value-type="float" office:value="0.000000256676">
                <text:p>0.000000256676</text:p>
              </table:table-cell>
              <table:table-cell office:value-type="float" office:value="0.0000103242">
                <text:p>0.0000103242</text:p>
              </table:table-cell>
              <table:table-cell office:value-type="float" office:value="0.000000211464">
                <text:p>0.000000211464</text:p>
              </table:table-cell>
              <table:table-cell office:value-type="float" office:value="0.00000016376">
                <text:p>0.00000016376</text:p>
              </table:table-cell>
              <table:table-cell office:value-type="float" office:value="0.00000514219">
                <text:p>0.000005142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4.2$Linux_X86_64 LibreOffice_project/6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434cm" svg:height="9.271cm" xlink:href=".." xlink:type="simple" chart:class="chart:bar" chart:style-name="ch1">
        <chart:legend chart:legend-position="end" svg:x="15.296cm" svg:y="4.336cm" style:legend-expansion="high" chart:style-name="ch2"/>
        <chart:plot-area chart:style-name="ch3" svg:x="0.328cm" svg:y="0.185cm" svg:width="14.64cm" svg:height="8.901cm">
          <chart:coordinate-region svg:x="4.651cm" svg:y="0.185cm" svg:width="9.502cm" svg:height="8.254cm"/>
          <chart:axis chart:dimension="x" chart:name="primary-x" chart:style-name="ch4" chartooo:axis-type="auto">
            <chartooo:date-scale/>
            <chart:categories table:cell-range-address="out.B1:out.S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ut.B2:out.S2" chart:label-cell-address="out.A2:out.A2" chart:class="chart:bar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insertionsort_MelhorCaso</text:p>
                <draw:g>
                  <svg:desc>out.B1:out.S1</svg:desc>
                </draw:g>
              </table:table-cell>
              <table:table-cell office:value-type="string">
                <text:p> insertionsort_PiorCaso</text:p>
              </table:table-cell>
              <table:table-cell office:value-type="string">
                <text:p> insertionsort_CasoMedio</text:p>
              </table:table-cell>
              <table:table-cell office:value-type="string">
                <text:p> shellsort_MelhorCaso</text:p>
              </table:table-cell>
              <table:table-cell office:value-type="string">
                <text:p> shellsort_PiorCaso</text:p>
              </table:table-cell>
              <table:table-cell office:value-type="string">
                <text:p> shellsort_CasoMedio</text:p>
              </table:table-cell>
              <table:table-cell office:value-type="string">
                <text:p> bubblesort_MelhorCaso</text:p>
              </table:table-cell>
              <table:table-cell office:value-type="string">
                <text:p> bubblesort_PiorCaso</text:p>
              </table:table-cell>
              <table:table-cell office:value-type="string">
                <text:p> bubblesort_CasoMedio</text:p>
              </table:table-cell>
              <table:table-cell office:value-type="string">
                <text:p> selectionsort_MelhorCaso</text:p>
              </table:table-cell>
              <table:table-cell office:value-type="string">
                <text:p> selectionsort_PiorCaso</text:p>
              </table:table-cell>
              <table:table-cell office:value-type="string">
                <text:p> selectionsort_CasoMedio</text:p>
              </table:table-cell>
              <table:table-cell office:value-type="string">
                <text:p> mergesort_MelhorCaso</text:p>
              </table:table-cell>
              <table:table-cell office:value-type="string">
                <text:p> mergesort_PiorCaso</text:p>
              </table:table-cell>
              <table:table-cell office:value-type="string">
                <text:p> mergesort_CasoMedio</text:p>
              </table:table-cell>
              <table:table-cell office:value-type="string">
                <text:p> quicksort_MelhorCaso</text:p>
              </table:table-cell>
              <table:table-cell office:value-type="string">
                <text:p> quicksort_PiorCaso</text:p>
              </table:table-cell>
              <table:table-cell office:value-type="string">
                <text:p> quicksort_CasoMedio</text:p>
              </table:table-cell>
            </table:table-row>
          </table:table-header-rows>
          <table:table-rows>
            <table:table-row>
              <table:table-cell office:value-type="string">
                <text:p>10</text:p>
                <draw:g>
                  <svg:desc>out.A2:out.A2</svg:desc>
                </draw:g>
              </table:table-cell>
              <table:table-cell office:value-type="float" office:value="0.00000000335561">
                <text:p>0.00000000335561</text:p>
                <draw:g>
                  <svg:desc>out.B2:out.S2</svg:desc>
                </draw:g>
              </table:table-cell>
              <table:table-cell office:value-type="float" office:value="0.00000000278251">
                <text:p>0.00000000278251</text:p>
              </table:table-cell>
              <table:table-cell office:value-type="float" office:value="0.000000294586">
                <text:p>0.000000294586</text:p>
              </table:table-cell>
              <table:table-cell office:value-type="float" office:value="0.00000000810643">
                <text:p>0.00000000810643</text:p>
              </table:table-cell>
              <table:table-cell office:value-type="float" office:value="0.00000000491682">
                <text:p>0.00000000491682</text:p>
              </table:table-cell>
              <table:table-cell office:value-type="float" office:value="0.000000652072">
                <text:p>0.000000652072</text:p>
              </table:table-cell>
              <table:table-cell office:value-type="float" office:value="0.00000000255722">
                <text:p>0.00000000255722</text:p>
              </table:table-cell>
              <table:table-cell office:value-type="float" office:value="0.00000000372714">
                <text:p>0.00000000372714</text:p>
              </table:table-cell>
              <table:table-cell office:value-type="float" office:value="0.000000603077">
                <text:p>0.000000603077</text:p>
              </table:table-cell>
              <table:table-cell office:value-type="float" office:value="0.00000000284575">
                <text:p>0.00000000284575</text:p>
              </table:table-cell>
              <table:table-cell office:value-type="float" office:value="0.0000000030078">
                <text:p>0.0000000030078</text:p>
              </table:table-cell>
              <table:table-cell office:value-type="float" office:value="0.000000395792">
                <text:p>0.000000395792</text:p>
              </table:table-cell>
              <table:table-cell office:value-type="float" office:value="0.0000000084661">
                <text:p>0.0000000084661</text:p>
              </table:table-cell>
              <table:table-cell office:value-type="float" office:value="0.00000000417772">
                <text:p>0.00000000417772</text:p>
              </table:table-cell>
              <table:table-cell office:value-type="float" office:value="0.000000714081">
                <text:p>0.000000714081</text:p>
              </table:table-cell>
              <table:table-cell office:value-type="float" office:value="0.00000000372714">
                <text:p>0.00000000372714</text:p>
              </table:table-cell>
              <table:table-cell office:value-type="float" office:value="0.00000000293665">
                <text:p>0.00000000293665</text:p>
              </table:table-cell>
              <table:table-cell office:value-type="float" office:value="0.000000416764">
                <text:p>0.0000004167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4.2$Linux_X86_64 LibreOffice_project/6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579d1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434cm" svg:height="9.271cm" xlink:href=".." xlink:type="simple" chart:class="chart:bar" chart:style-name="ch1">
        <chart:legend chart:legend-position="end" svg:x="14.914cm" svg:y="4.336cm" style:legend-expansion="high" chart:style-name="ch2"/>
        <chart:plot-area chart:style-name="ch3" svg:x="0.328cm" svg:y="0.185cm" svg:width="14.258cm" svg:height="8.901cm">
          <chart:coordinate-region svg:x="4.651cm" svg:y="0.185cm" svg:width="9.503cm" svg:height="8.254cm"/>
          <chart:axis chart:dimension="x" chart:name="primary-x" chart:style-name="ch4" chartooo:axis-type="auto">
            <chartooo:date-scale/>
            <chart:categories table:cell-range-address="out.B1:out.S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ut.B4:out.S4" chart:label-cell-address="out.A4:out.A4" chart:class="chart:bar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insertionsort_MelhorCaso</text:p>
                <draw:g>
                  <svg:desc>out.B1:out.S1</svg:desc>
                </draw:g>
              </table:table-cell>
              <table:table-cell office:value-type="string">
                <text:p> insertionsort_PiorCaso</text:p>
              </table:table-cell>
              <table:table-cell office:value-type="string">
                <text:p> insertionsort_CasoMedio</text:p>
              </table:table-cell>
              <table:table-cell office:value-type="string">
                <text:p> shellsort_MelhorCaso</text:p>
              </table:table-cell>
              <table:table-cell office:value-type="string">
                <text:p> shellsort_PiorCaso</text:p>
              </table:table-cell>
              <table:table-cell office:value-type="string">
                <text:p> shellsort_CasoMedio</text:p>
              </table:table-cell>
              <table:table-cell office:value-type="string">
                <text:p> bubblesort_MelhorCaso</text:p>
              </table:table-cell>
              <table:table-cell office:value-type="string">
                <text:p> bubblesort_PiorCaso</text:p>
              </table:table-cell>
              <table:table-cell office:value-type="string">
                <text:p> bubblesort_CasoMedio</text:p>
              </table:table-cell>
              <table:table-cell office:value-type="string">
                <text:p> selectionsort_MelhorCaso</text:p>
              </table:table-cell>
              <table:table-cell office:value-type="string">
                <text:p> selectionsort_PiorCaso</text:p>
              </table:table-cell>
              <table:table-cell office:value-type="string">
                <text:p> selectionsort_CasoMedio</text:p>
              </table:table-cell>
              <table:table-cell office:value-type="string">
                <text:p> mergesort_MelhorCaso</text:p>
              </table:table-cell>
              <table:table-cell office:value-type="string">
                <text:p> mergesort_PiorCaso</text:p>
              </table:table-cell>
              <table:table-cell office:value-type="string">
                <text:p> mergesort_CasoMedio</text:p>
              </table:table-cell>
              <table:table-cell office:value-type="string">
                <text:p> quicksort_MelhorCaso</text:p>
              </table:table-cell>
              <table:table-cell office:value-type="string">
                <text:p> quicksort_PiorCaso</text:p>
              </table:table-cell>
              <table:table-cell office:value-type="string">
                <text:p> quicksort_CasoMedio</text:p>
              </table:table-cell>
            </table:table-row>
          </table:table-header-rows>
          <table:table-rows>
            <table:table-row>
              <table:table-cell office:value-type="string">
                <text:p>1000</text:p>
                <draw:g>
                  <svg:desc>out.A4:out.A4</svg:desc>
                </draw:g>
              </table:table-cell>
              <table:table-cell office:value-type="float" office:value="0.00013302">
                <text:p>0.00013302</text:p>
                <draw:g>
                  <svg:desc>out.B4:out.S4</svg:desc>
                </draw:g>
              </table:table-cell>
              <table:table-cell office:value-type="float" office:value="0.00000265743">
                <text:p>0.00000265743</text:p>
              </table:table-cell>
              <table:table-cell office:value-type="float" office:value="0.0000177742">
                <text:p>0.0000177742</text:p>
              </table:table-cell>
              <table:table-cell office:value-type="float" office:value="0.000206416">
                <text:p>0.000206416</text:p>
              </table:table-cell>
              <table:table-cell office:value-type="float" office:value="0.000206116">
                <text:p>0.000206116</text:p>
              </table:table-cell>
              <table:table-cell office:value-type="float" office:value="0.00127487">
                <text:p>0.00127487</text:p>
              </table:table-cell>
              <table:table-cell office:value-type="float" office:value="0.000582204">
                <text:p>0.000582204</text:p>
              </table:table-cell>
              <table:table-cell office:value-type="float" office:value="0.00040923">
                <text:p>0.00040923</text:p>
              </table:table-cell>
              <table:table-cell office:value-type="float" office:value="0.00241293">
                <text:p>0.00241293</text:p>
              </table:table-cell>
              <table:table-cell office:value-type="float" office:value="0.000191007">
                <text:p>0.000191007</text:p>
              </table:table-cell>
              <table:table-cell office:value-type="float" office:value="0.000184381">
                <text:p>0.000184381</text:p>
              </table:table-cell>
              <table:table-cell office:value-type="float" office:value="0.00112227">
                <text:p>0.00112227</text:p>
              </table:table-cell>
              <table:table-cell office:value-type="float" office:value="0.0000184118">
                <text:p>0.0000184118</text:p>
              </table:table-cell>
              <table:table-cell office:value-type="float" office:value="0.0000135509">
                <text:p>0.0000135509</text:p>
              </table:table-cell>
              <table:table-cell office:value-type="float" office:value="0.0000745676">
                <text:p>0.0000745676</text:p>
              </table:table-cell>
              <table:table-cell office:value-type="float" office:value="0.0000136596">
                <text:p>0.0000136596</text:p>
              </table:table-cell>
              <table:table-cell office:value-type="float" office:value="0.00000759631">
                <text:p>0.00000759631</text:p>
              </table:table-cell>
              <table:table-cell office:value-type="float" office:value="0.0000430491">
                <text:p>0.000043049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4.2$Linux_X86_64 LibreOffice_project/6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579d1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434cm" svg:height="9.271cm" xlink:href=".." xlink:type="simple" chart:class="chart:bar" chart:style-name="ch1">
        <chart:legend chart:legend-position="end" svg:x="14.723cm" svg:y="4.336cm" style:legend-expansion="high" chart:style-name="ch2"/>
        <chart:plot-area chart:style-name="ch3" svg:x="0.328cm" svg:y="0.185cm" svg:width="14.067cm" svg:height="8.901cm">
          <chart:coordinate-region svg:x="4.651cm" svg:y="0.185cm" svg:width="9.503cm" svg:height="8.254cm"/>
          <chart:axis chart:dimension="x" chart:name="primary-x" chart:style-name="ch4" chartooo:axis-type="auto">
            <chartooo:date-scale/>
            <chart:categories table:cell-range-address="out.B1:out.S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ut.B5:out.S5" chart:label-cell-address="out.A5:out.A5" chart:class="chart:bar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insertionsort_MelhorCaso</text:p>
                <draw:g>
                  <svg:desc>out.B1:out.S1</svg:desc>
                </draw:g>
              </table:table-cell>
              <table:table-cell office:value-type="string">
                <text:p> insertionsort_PiorCaso</text:p>
              </table:table-cell>
              <table:table-cell office:value-type="string">
                <text:p> insertionsort_CasoMedio</text:p>
              </table:table-cell>
              <table:table-cell office:value-type="string">
                <text:p> shellsort_MelhorCaso</text:p>
              </table:table-cell>
              <table:table-cell office:value-type="string">
                <text:p> shellsort_PiorCaso</text:p>
              </table:table-cell>
              <table:table-cell office:value-type="string">
                <text:p> shellsort_CasoMedio</text:p>
              </table:table-cell>
              <table:table-cell office:value-type="string">
                <text:p> bubblesort_MelhorCaso</text:p>
              </table:table-cell>
              <table:table-cell office:value-type="string">
                <text:p> bubblesort_PiorCaso</text:p>
              </table:table-cell>
              <table:table-cell office:value-type="string">
                <text:p> bubblesort_CasoMedio</text:p>
              </table:table-cell>
              <table:table-cell office:value-type="string">
                <text:p> selectionsort_MelhorCaso</text:p>
              </table:table-cell>
              <table:table-cell office:value-type="string">
                <text:p> selectionsort_PiorCaso</text:p>
              </table:table-cell>
              <table:table-cell office:value-type="string">
                <text:p> selectionsort_CasoMedio</text:p>
              </table:table-cell>
              <table:table-cell office:value-type="string">
                <text:p> mergesort_MelhorCaso</text:p>
              </table:table-cell>
              <table:table-cell office:value-type="string">
                <text:p> mergesort_PiorCaso</text:p>
              </table:table-cell>
              <table:table-cell office:value-type="string">
                <text:p> mergesort_CasoMedio</text:p>
              </table:table-cell>
              <table:table-cell office:value-type="string">
                <text:p> quicksort_MelhorCaso</text:p>
              </table:table-cell>
              <table:table-cell office:value-type="string">
                <text:p> quicksort_PiorCaso</text:p>
              </table:table-cell>
              <table:table-cell office:value-type="string">
                <text:p> quicksort_CasoMedio</text:p>
              </table:table-cell>
            </table:table-row>
          </table:table-header-rows>
          <table:table-rows>
            <table:table-row>
              <table:table-cell office:value-type="string">
                <text:p>10000</text:p>
                <draw:g>
                  <svg:desc>out.A5:out.A5</svg:desc>
                </draw:g>
              </table:table-cell>
              <table:table-cell office:value-type="float" office:value="0.0367423">
                <text:p>0.0367423</text:p>
                <draw:g>
                  <svg:desc>out.B5:out.S5</svg:desc>
                </draw:g>
              </table:table-cell>
              <table:table-cell office:value-type="float" office:value="0.0000889619">
                <text:p>0.0000889619</text:p>
              </table:table-cell>
              <table:table-cell office:value-type="float" office:value="0.0000928638">
                <text:p>0.0000928638</text:p>
              </table:table-cell>
              <table:table-cell office:value-type="float" office:value="0.0569572">
                <text:p>0.0569572</text:p>
              </table:table-cell>
              <table:table-cell office:value-type="float" office:value="0.052353">
                <text:p>0.052353</text:p>
              </table:table-cell>
              <table:table-cell office:value-type="float" office:value="0.051308">
                <text:p>0.051308</text:p>
              </table:table-cell>
              <table:table-cell office:value-type="float" office:value="0.179106">
                <text:p>0.179106</text:p>
              </table:table-cell>
              <table:table-cell office:value-type="float" office:value="0.0983434">
                <text:p>0.0983434</text:p>
              </table:table-cell>
              <table:table-cell office:value-type="float" office:value="0.0989193">
                <text:p>0.0989193</text:p>
              </table:table-cell>
              <table:table-cell office:value-type="float" office:value="0.0500251">
                <text:p>0.0500251</text:p>
              </table:table-cell>
              <table:table-cell office:value-type="float" office:value="0.0487353">
                <text:p>0.0487353</text:p>
              </table:table-cell>
              <table:table-cell office:value-type="float" office:value="0.0548517">
                <text:p>0.0548517</text:p>
              </table:table-cell>
              <table:table-cell office:value-type="float" office:value="0.000707824">
                <text:p>0.000707824</text:p>
              </table:table-cell>
              <table:table-cell office:value-type="float" office:value="0.000550283">
                <text:p>0.000550283</text:p>
              </table:table-cell>
              <table:table-cell office:value-type="float" office:value="0.00057373">
                <text:p>0.00057373</text:p>
              </table:table-cell>
              <table:table-cell office:value-type="float" office:value="0.000514629">
                <text:p>0.000514629</text:p>
              </table:table-cell>
              <table:table-cell office:value-type="float" office:value="0.000261177">
                <text:p>0.000261177</text:p>
              </table:table-cell>
              <table:table-cell office:value-type="float" office:value="0.000255672">
                <text:p>0.00025567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4.2$Linux_X86_64 LibreOffice_project/6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